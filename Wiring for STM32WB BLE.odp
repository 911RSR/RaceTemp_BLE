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36000000FFCFB7CE00.png"/>
  <manifest:file-entry manifest:media-type="image/png" manifest:full-path="Pictures/10000000000001CD000001D10E5A3A62.png"/>
  <manifest:file-entry manifest:media-type="image/png" manifest:full-path="Pictures/100000000000019000000098154EA1A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1cm" svg:stroke-color="#808080" draw:marker-start-width="0.65cm" draw:marker-end-width="0.65cm" draw:fill="none" draw:fill-color="#000000" draw:textarea-vertical-align="middle" fo:padding-top="0.175cm" fo:padding-bottom="0.175cm" fo:padding-left="0.3cm" fo:padding-right="0.3cm"/>
    </style:style>
    <style:style style:name="gr3" style:family="graphic" style:parent-style-name="objectwithoutfill">
      <style:graphic-properties svg:stroke-width="0cm" svg:stroke-color="#808080" draw:marker-start-width="0.5cm" draw:marker-end-width="0.5cm" draw:fill="none" draw:fill-color="#000000" draw:textarea-vertical-align="middle" fo:padding-top="0.125cm" fo:padding-bottom="0.125cm" fo:padding-left="0.25cm" fo:padding-right="0.25cm"/>
    </style:style>
    <style:style style:name="gr4" style:family="graphic" style:parent-style-name="objectwithoutfill">
      <style:graphic-properties svg:stroke-width="0.1cm" svg:stroke-color="#ff0000" draw:marker-start="" draw:marker-start-width="0.65cm" draw:marker-end="" draw:marker-end-width="0.65cm" draw:fill="none" draw:fill-color="#000000" draw:textarea-vertical-align="middle" fo:padding-top="0.175cm" fo:padding-bottom="0.175cm" fo:padding-left="0.3cm" fo:padding-right="0.3cm"/>
    </style:style>
    <style:style style:name="gr5" style:family="graphic" style:parent-style-name="objectwithoutfill">
      <style:graphic-properties svg:stroke-width="0.1cm" svg:stroke-color="#ffff00" draw:marker-start="" draw:marker-start-width="0.65cm" draw:marker-end="" draw:marker-end-width="0.65cm" draw:fill="none" draw:fill-color="#000000" draw:textarea-vertical-align="middle" fo:padding-top="0.175cm" fo:padding-bottom="0.175cm" fo:padding-left="0.3cm" fo:padding-right="0.3cm"/>
    </style:style>
    <style:style style:name="gr6" style:family="graphic" style:parent-style-name="objectwithoutfill">
      <style:graphic-properties svg:stroke-width="0.1cm" svg:stroke-color="#008000" draw:marker-start="" draw:marker-start-width="0.65cm" draw:marker-end="" draw:marker-end-width="0.65cm" draw:fill="none" draw:fill-color="#000000" draw:textarea-vertical-align="middle" fo:padding-top="0.175cm" fo:padding-bottom="0.175cm" fo:padding-left="0.3cm" fo:padding-right="0.3cm"/>
    </style:style>
    <style:style style:name="gr7" style:family="graphic" style:parent-style-name="objectwithoutfill">
      <style:graphic-properties svg:stroke-width="0.1cm" svg:stroke-color="#9966cc" draw:marker-start="" draw:marker-start-width="0.65cm" draw:marker-end="" draw:marker-end-width="0.65cm" draw:fill="none" draw:fill-color="#000000" draw:textarea-vertical-align="middle" fo:padding-top="0.175cm" fo:padding-bottom="0.175cm" fo:padding-left="0.3cm" fo:padding-right="0.3cm"/>
    </style:style>
    <style:style style:name="gr8" style:family="graphic" style:parent-style-name="objectwithoutfill">
      <style:graphic-properties svg:stroke-width="0.1cm" svg:stroke-color="#47b8b8" draw:marker-start="" draw:marker-start-width="0.65cm" draw:marker-end="" draw:marker-end-width="0.65cm" draw:fill="none" draw:fill-color="#000000"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1.017cm"/>
    </style:style>
    <style:style style:name="gr10" style:family="graphic" style:parent-style-name="objectwithoutfill">
      <style:graphic-properties svg:stroke-width="0.1cm" svg:stroke-color="#23ff23" draw:marker-start="" draw:marker-start-width="0.65cm" draw:marker-end="" draw:marker-end-width="0.65cm" draw:fill="none" draw:fill-color="#000000"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2.849cm"/>
    </style:style>
    <style:style style:name="gr12" style:family="graphic">
      <style:graphic-properties style:protect="size"/>
    </style:style>
    <style:style style:name="gr13" style:family="graphic" style:parent-style-name="standard">
      <style:graphic-properties draw:stroke="none" svg:stroke-color="#000000" draw:fill="none" draw:fill-color="#ffffff" draw:textarea-horizontal-align="left" draw:auto-grow-height="true" draw:auto-grow-width="false" fo:min-height="11.721cm" fo:min-width="0cm"/>
    </style:style>
    <style:style style:name="gr14" style:family="graphic" style:parent-style-name="standard">
      <style:graphic-properties draw:stroke="none" svg:stroke-color="#000000" draw:fill="none" draw:fill-color="#ffffff" draw:auto-grow-height="true" draw:auto-grow-width="false" fo:max-height="0cm" fo:min-height="7.932cm"/>
    </style:style>
    <style:style style:name="gr15" style:family="graphic" style:parent-style-name="standard">
      <style:graphic-properties draw:stroke="none" svg:stroke-color="#000000" draw:fill="none" draw:fill-color="#ffffff" draw:auto-grow-height="true" draw:auto-grow-width="false" fo:max-height="0cm" fo:min-height="0.809cm"/>
    </style:style>
    <style:style style:name="gr16" style:family="graphic" style:parent-style-name="standard">
      <style:graphic-properties draw:stroke="none" svg:stroke-color="#000000" draw:fill="solid" draw:fill-color="#c0c0c0" draw:auto-grow-height="true" draw:auto-grow-width="false" fo:max-height="0cm" fo:min-height="0.809cm"/>
    </style:style>
    <style:style style:name="gr17" style:family="graphic" style:parent-style-name="standard">
      <style:graphic-properties draw:stroke="none" svg:stroke-color="#000000" draw:fill="solid" draw:fill-color="#c0c0c0" draw:auto-grow-height="true" draw:auto-grow-width="false" fo:max-height="0cm" fo:min-height="0cm"/>
    </style:style>
    <style:style style:name="gr18" style:family="graphic" style:parent-style-name="standard">
      <style:graphic-properties draw:stroke="none" svg:stroke-color="#000000" draw:fill="solid" draw:fill-color="#c0c0c0" draw:auto-grow-height="true" draw:auto-grow-width="false" fo:max-height="0cm" fo:min-height="0.954cm"/>
    </style:style>
    <style:style style:name="gr19" style:family="graphic" style:parent-style-name="objectwithoutfill">
      <style:graphic-properties draw:marker-start="" draw:fill="none" draw:textarea-vertical-align="middle"/>
    </style:style>
    <style:style style:name="gr20" style:family="graphic" style:parent-style-name="standard">
      <style:graphic-properties draw:stroke="none" draw:marker-start="" draw:fill="none" fo:min-height="0.55cm"/>
    </style:style>
    <style:style style:name="gr21" style:family="graphic" style:parent-style-name="objectwithoutfill">
      <style:graphic-properties svg:stroke-width="0.1cm" svg:stroke-color="#e6ff00" draw:marker-start="" draw:marker-start-width="0.65cm" draw:marker-end="" draw:marker-end-width="0.65cm" draw:fill="none" draw:fill-color="#000000" draw:textarea-vertical-align="middle" fo:padding-top="0.175cm" fo:padding-bottom="0.175cm" fo:padding-left="0.3cm" fo:padding-right="0.3cm"/>
    </style:style>
    <style:style style:name="gr22" style:family="graphic" style:parent-style-name="standard">
      <style:graphic-properties draw:stroke="none" draw:marker-start="" draw:fill="none" fo:min-height="0.714cm"/>
    </style:style>
    <style:style style:name="gr23" style:family="graphic" style:parent-style-name="standard">
      <style:graphic-properties draw:stroke="none" svg:stroke-color="#000000" draw:fill="solid" draw:fill-color="#c0c0c0" draw:auto-grow-height="true" draw:auto-grow-width="false" fo:max-height="0cm" fo:min-height="0.55cm"/>
    </style:style>
    <style:style style:name="gr24" style:family="graphic" style:parent-style-name="standard">
      <style:graphic-properties draw:stroke="none" draw:marker-start="" draw:fill="none" fo:min-height="0.551cm"/>
    </style:style>
    <style:style style:name="gr25" style:family="graphic" style:parent-style-name="standard">
      <style:graphic-properties draw:stroke="none" draw:marker-start="" draw:fill="none" fo:min-height="6.409cm"/>
    </style:style>
    <style:style style:name="gr26" style:family="graphic" style:parent-style-name="standard">
      <style:graphic-properties draw:stroke="none" svg:stroke-color="#000000" draw:fill="none" draw:fill-color="#ffffff" draw:textarea-horizontal-align="left" draw:auto-grow-height="true" draw:auto-grow-width="false" fo:min-height="9.921cm" fo:min-width="0cm"/>
    </style:style>
    <style:style style:name="gr27" style:family="graphic" style:parent-style-name="standard">
      <style:graphic-properties draw:stroke="none" svg:stroke-color="#000000" draw:fill="none" draw:fill-color="#ffffff" draw:auto-grow-height="true" draw:auto-grow-width="false" fo:max-height="0cm" fo:min-height="0.95cm"/>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5.209cm"/>
    </style:style>
    <style:style style:name="P1" style:family="paragraph">
      <style:paragraph-properties fo:text-align="center"/>
    </style:style>
    <style:style style:name="P2" style:family="paragraph">
      <style:text-properties fo:font-size="13pt" fo:font-weight="bold" style:font-size-asian="13pt" style:font-weight-asian="bold" style:font-size-complex="13pt" style:font-weight-complex="bold"/>
    </style:style>
    <style:style style:name="P3" style:family="paragraph">
      <style:text-properties fo:font-size="20pt"/>
    </style:style>
    <style:style style:name="P4" style:family="paragraph">
      <style:paragraph-properties fo:text-align="end"/>
    </style:style>
    <style:style style:name="P5" style:family="paragraph">
      <style:paragraph-properties fo:text-align="end"/>
      <style:text-properties fo:font-size="11pt" fo:font-weight="bold" style:font-size-asian="11pt" style:font-size-complex="11pt"/>
    </style:style>
    <style:style style:name="P6" style:family="paragraph">
      <style:text-properties fo:font-size="18pt"/>
    </style:style>
    <style:style style:name="P7" style:family="paragraph">
      <style:text-properties fo:font-size="14pt"/>
    </style:style>
    <style:style style:name="P8" style:family="paragraph">
      <style:text-properties fo:font-size="14pt" style:font-size-asian="14pt" style:font-size-complex="14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style:font-size-asian="12pt" style:font-size-complex="12pt"/>
    </style:style>
    <style:style style:name="T3" style:family="text">
      <style:text-properties fo:font-family="Arial" style:font-style-name="Regular" style:font-family-generic="swiss" fo:font-size="12pt" fo:font-weight="bold" style:font-family-asian="Arial" style:font-style-name-asian="Regular" style:font-family-generic-asian="swiss" style:font-size-asian="12pt" style:font-family-complex="Arial" style:font-style-name-complex="Regular" style:font-family-generic-complex="swiss" style:font-size-complex="12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draw:style-name="gr1" draw:text-style-name="P1" draw:layer="layout" svg:width="8.501cm" svg:height="6.946cm" svg:x="2.5cm" svg:y="7.784cm">
          <draw:image xlink:href="Pictures/1000000000000136000000FFCFB7CE00.png" xlink:type="simple" xlink:show="embed" xlink:actuate="onLoad">
            <text:p/>
          </draw:image>
        </draw:frame>
        <draw:frame draw:style-name="gr1" draw:text-style-name="P1" draw:layer="layout" svg:width="10.582cm" svg:height="4.021cm" svg:x="12.618cm" svg:y="9.363cm">
          <draw:image xlink:href="Pictures/100000000000019000000098154EA1A8.png" xlink:type="simple" xlink:show="embed" xlink:actuate="onLoad">
            <text:p/>
          </draw:image>
        </draw:frame>
        <draw:path draw:style-name="gr2" draw:text-style-name="P1" draw:layer="layout" svg:width="8.477cm" svg:height="4.155cm" svg:x="9.122cm" svg:y="11.984cm" svg:viewBox="0 0 8478 4156" svg:d="M2 2313c-124 3087 6516 1610 7276 487s1200-2800 1200-2800">
          <text:p/>
        </draw:path>
        <draw:path draw:style-name="gr3" draw:text-style-name="P1" draw:layer="layout" svg:width="8.477cm" svg:height="4.155cm" svg:x="9.122cm" svg:y="11.985cm" svg:viewBox="0 0 8478 4156" svg:d="M2 2313c-124 3087 6516 1610 7276 487s1200-2800 1200-2800">
          <text:p/>
        </draw:path>
        <draw:path draw:style-name="gr4" draw:text-style-name="P1" draw:layer="layout" svg:width="7.399cm" svg:height="4.91cm" svg:x="10.2cm" svg:y="10.584cm" svg:viewBox="0 0 7400 4911" svg:d="M0 3600c203 1400 3000 1800 4800 600s2600-4200 2600-4200">
          <text:p/>
        </draw:path>
        <draw:path draw:style-name="gr5" draw:text-style-name="P1" draw:layer="layout" svg:width="14.392cm" svg:height="4.907cm" svg:x="3.599cm" svg:y="11.584cm" svg:viewBox="0 0 14393 4908" svg:d="M1 2800c-124 3087 11600 2200 13400 1000s600-3800 600-3800">
          <text:p/>
        </draw:path>
        <draw:path draw:style-name="gr6" draw:text-style-name="P1" draw:layer="layout" svg:width="14.401cm" svg:height="5.703cm" svg:x="3.998cm" svg:y="11.184cm" svg:viewBox="0 0 14402 5704" svg:d="M2 3200c-201 3832 11800 2432 13600 1232s0-4432 0-4432">
          <text:p/>
        </draw:path>
        <draw:path draw:style-name="gr7" draw:text-style-name="P1" draw:layer="layout" svg:width="5.776cm" svg:height="5.05cm" svg:x="9.6cm" svg:y="9.984cm" svg:viewBox="0 0 5777 5051" svg:d="M0 4201c1000-1801 2800 1800 4600 600s1000-4801 1000-4801">
          <text:p/>
        </draw:path>
        <draw:path draw:style-name="gr8" draw:text-style-name="P1" draw:layer="layout" svg:width="5.676cm" svg:height="4.702cm" svg:x="9.4cm" svg:y="9.933cm" svg:viewBox="0 0 5677 4703" svg:d="M0 4201c800-2150 2800 1450 4600 250s800-4451 800-4451">
          <text:p/>
        </draw:path>
        <draw:frame draw:style-name="gr9" draw:text-style-name="P2" draw:layer="layout" svg:width="4.001cm" svg:height="1.267cm" draw:transform="rotate (1.5707963267946) translate (14.403cm 9.586cm)">
          <draw:text-box>
            <text:p><text:span text:style-name="T1">USART1_RX</text:span></text:p>
            <text:p><text:span text:style-name="T1">USART2_TX</text:span></text:p>
          </draw:text-box>
        </draw:frame>
        <draw:path draw:style-name="gr10" draw:text-style-name="P1" draw:layer="layout" svg:width="15.605cm" svg:height="7.215cm" svg:x="3.398cm" svg:y="9.984cm" svg:viewBox="0 0 15606 7216" svg:d="M2 4496c-201 3832 12984 2904 14592 1504s1408-5600-1392-6000">
          <text:p/>
        </draw:path>
        <draw:frame presentation:style-name="pr1" draw:layer="layout" svg:width="25.199cm" svg:height="3.506cm" svg:x="1.4cm" svg:y="0.837cm" presentation:class="title">
          <draw:text-box>
            <text:p>Debugger Connections</text:p>
          </draw:text-box>
        </draw:frame>
        <draw:frame draw:style-name="gr11" draw:layer="layout" svg:width="10cm" svg:height="3.099cm" svg:x="2.4cm" svg:y="4.901cm">
          <draw:text-box>
            <text:p>Showing both sides of a </text:p>
            <text:p>STM32 V3MINIE debugger</text:p>
          </draw:text-box>
        </draw:frame>
        <presentation:notes draw:style-name="dp2">
          <draw:page-thumbnail draw:style-name="gr1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draw:style-name="gr1" draw:text-style-name="P1" draw:layer="layout" svg:width="10.982cm" svg:height="4.421cm" draw:transform="rotate (-1.57079632679579) translate (16.8cm 8.03cm)">
          <draw:image xlink:href="Pictures/100000000000019000000098154EA1A8.png" xlink:type="simple" xlink:show="embed" xlink:actuate="onLoad">
            <text:p/>
          </draw:image>
        </draw:frame>
        <draw:frame draw:style-name="gr13" draw:text-style-name="P5" draw:layer="layout" svg:width="6.374cm" svg:height="11.971cm" svg:x="6.2cm" svg:y="8cm">
          <draw:text-box>
            <text:p text:style-name="P4"><text:span text:style-name="T2">Bat Neg = G</text:span></text:p>
            <text:p text:style-name="P4"><text:span text:style-name="T2">Bat Pos = 5V</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s/></text:span><text:span text:style-name="T2">A0</text:span></text:p>
            <text:p text:style-name="P4"><text:span text:style-name="T2">MAP = A1</text:span></text:p>
            <text:p text:style-name="P4"><text:span text:style-name="T2">NTC = A2</text:span></text:p>
            <text:p text:style-name="P4"><text:span text:style-name="T2">MAP VCC &amp; 1k</text:span><text:span text:style-name="T3">Ω to NTC</text:span><text:span text:style-name="T2"> = A3</text:span></text:p>
            <text:p text:style-name="P4"><text:span text:style-name="T2">TC NSS = SPI1_NSS = A4</text:span></text:p>
            <text:p text:style-name="P4"><text:span text:style-name="T2">TC SCK = SPI1_SCK = A5</text:span></text:p>
            <text:p text:style-name="P4"><text:span text:style-name="T2">TC SO = SPI1_MISO = A6</text:span></text:p>
            <text:p text:style-name="P4"><text:span text:style-name="T2">SPI1_MOSI = A7</text:span></text:p>
            <text:p text:style-name="P4"><text:span text:style-name="T2"><text:s/></text:span><text:span text:style-name="T2">TC VCC = A8</text:span></text:p>
            <text:p text:style-name="P4"><text:span text:style-name="T2">A9</text:span></text:p>
            <text:p text:style-name="P4"><text:span text:style-name="T2">B2</text:span></text:p>
            <text:p text:style-name="P4"><text:span text:style-name="T2">TC GND = G</text:span></text:p>
          </draw:text-box>
        </draw:frame>
        <draw:frame draw:style-name="gr14" draw:text-style-name="P2" draw:layer="layout" svg:width="4.601cm" svg:height="8.182cm" svg:x="16.799cm" svg:y="8.03cm">
          <draw:text-box>
            <text:p><text:span text:style-name="T1">G <text:s/></text:span></text:p>
            <text:p><text:span text:style-name="T1">G</text:span></text:p>
            <text:p><text:span text:style-name="T1">3V3</text:span></text:p>
            <text:p><text:span text:style-name="T1">3V3</text:span></text:p>
            <text:p><text:span text:style-name="T1">B7 = USART1_RX</text:span></text:p>
            <text:p><text:span text:style-name="T1">B6 = USART2_TX</text:span></text:p>
            <text:p><text:span text:style-name="T1">B5 = SWO</text:span></text:p>
            <text:p><text:span text:style-name="T1">B4</text:span></text:p>
            <text:p><text:span text:style-name="T1">B3</text:span></text:p>
            <text:p><text:span text:style-name="T1">A15</text:span></text:p>
            <text:p><text:span text:style-name="T1">A10</text:span></text:p>
            <text:p><text:span text:style-name="T1">E4</text:span></text:p>
            <text:p><text:span text:style-name="T1">B1</text:span></text:p>
            <text:p><text:span text:style-name="T1">B0</text:span></text:p>
            <text:p><text:span text:style-name="T1">G = Pres GND</text:span></text:p>
          </draw:text-box>
        </draw:frame>
        <draw:frame presentation:style-name="pr1" draw:layer="layout" svg:width="25.199cm" svg:height="3.506cm" svg:x="1.4cm" svg:y="0.837cm" presentation:class="title" presentation:user-transformed="true">
          <draw:text-box>
            <text:p>Simple/Easy RaceTemp with only Thermocouple, MAP and NTC</text:p>
          </draw:text-box>
        </draw:frame>
        <draw:frame draw:style-name="gr11" draw:layer="layout" svg:width="20.2cm" svg:height="3.099cm" svg:x="1.2cm" svg:y="4.6cm">
          <draw:text-box>
            <text:p>No shielding or decoupling – electric noise can cause problems here, both for the BLE connection and for ADC/sensor accuracy. </text:p>
          </draw:text-box>
        </draw:frame>
        <presentation:notes draw:style-name="dp2">
          <draw:page-thumbnail draw:style-name="gr1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layer="layout" svg:width="25.199cm" svg:height="3.506cm" svg:x="1.6cm" svg:y="0.325cm" presentation:class="title" presentation:user-transformed="true">
          <draw:text-box>
            <text:p>EMI Instructions</text:p>
          </draw:text-box>
        </draw:frame>
        <draw:frame draw:style-name="gr15" draw:text-style-name="P6" draw:layer="layout" svg:width="25.6cm" svg:height="8.795cm" svg:x="1.6cm" svg:y="3.205cm">
          <draw:text-box>
            <text:list text:style-name="L1">
              <text:list-item>
                <text:p text:style-name="P6">Put the battery and the STM32-board inside a shielded box that will be our “chassis” and ground reference. <text:s/>My “shielded box” is a waterproof plastic box with inside lining of aluminium foil tape. <text:s/>Connect Bat. Neg. and STM32 GND to chassis (the aluminium lining). <text:s/>Insulating tape glue? <text:s/>Tape with overlap and it will anyway shield in MHz-range! </text:p>
              </text:list-item>
              <text:list-item>
                <text:p text:style-name="P6">Place the BLE antenna next to a window in the aluminium tape. <text:s/>The antenna shall be located/oriented away from wires and electric noise. <text:s/>Do not place the antenna next to the ignition probe. <text:s text:c="3"/></text:p>
              </text:list-item>
              <text:list-item>
                <text:p text:style-name="P6">Add a 100 nF ceramic capacitor to chassis to every wire entering/exiting the shielded box. <text:s/>Those capacitors shall be located as close as possible to the wire exit location in the box and connect to the same piece of tape as the GND (not connected via tape overlap, as the glue might be a DC isolator). <text:s/>See example below for a NTC. <text:s/></text:p>
              </text:list-item>
              <text:list-item>
                <text:p text:style-name="P6">Consider using twisted pair wires and shielded wires!</text:p>
              </text:list-item>
            </text:list>
          </draw:text-box>
        </draw:frame>
        <draw:path draw:style-name="gr2" draw:text-style-name="P1" draw:layer="layout" svg:width="7.999cm" svg:height="6.638cm" svg:x="8.4cm" svg:y="12.6cm" svg:viewBox="0 0 8000 6639" svg:d="M0 215c133 2067 67 4133 200 6200 2533 67 6625 297 7600 200 0-1600 200-6615 200-6615 0 0-5267 143-8000 215z">
          <text:p/>
        </draw:path>
        <draw:path draw:style-name="gr4" draw:text-style-name="P1" draw:layer="layout" svg:width="11.799cm" svg:height="2.421cm" svg:x="1.4cm" svg:y="15.815cm" svg:viewBox="0 0 11800 2422" svg:d="M0 200c203 1400 3400 3000 5200 1800s6600-2000 6600-2000">
          <text:p/>
        </draw:path>
        <draw:path draw:style-name="gr5" draw:text-style-name="P1" draw:layer="layout" svg:width="7.78cm" svg:height="2.441cm" svg:x="1.143cm" svg:y="16.015cm" svg:viewBox="0 0 7781 2442" svg:d="M57 0c-367 1494 1109 1280 2000 1400 442-13 712 818 1000 1000s594-286 1200-400c1064-434 4600-1400 3200 0">
          <text:p/>
        </draw:path>
        <draw:path draw:style-name="gr5" draw:text-style-name="P1" draw:layer="layout" svg:width="1.774cm" svg:height="1.423cm" svg:x="11.437cm" svg:y="16.815cm" svg:viewBox="0 0 1775 1424" svg:d="M0 0c363 1600 1927 1412 1763 1422">
          <text:p/>
        </draw:path>
        <draw:frame draw:style-name="gr16" draw:text-style-name="P6" draw:layer="layout" svg:width="2cm" svg:height="1.059cm" svg:x="0.4cm" svg:y="14.956cm">
          <draw:text-box>
            <text:p text:style-name="P6">NTC</text:p>
          </draw:text-box>
        </draw:frame>
        <draw:frame draw:style-name="gr1" draw:text-style-name="P1" draw:layer="layout" svg:width="5.2cm" svg:height="2.2cm" draw:transform="rotate (-1.57079632679579) translate (15.4cm 13.615cm)">
          <draw:image xlink:href="Pictures/100000000000019000000098154EA1A8.png" xlink:type="simple" xlink:show="embed" xlink:actuate="onLoad">
            <text:p/>
          </draw:image>
        </draw:frame>
        <draw:frame draw:style-name="gr17" draw:layer="layout" svg:width="0.132cm" svg:height="1.204cm" svg:x="9.468cm" svg:y="15.378cm">
          <draw:text-box>
            <text:p/>
          </draw:text-box>
        </draw:frame>
        <draw:frame draw:style-name="gr18" draw:layer="layout" svg:width="0.132cm" svg:height="1.204cm" svg:x="9.2cm" svg:y="15.378cm">
          <draw:text-box>
            <text:p/>
          </draw:text-box>
        </draw:frame>
        <draw:line draw:style-name="gr19" draw:text-style-name="P1" draw:layer="layout" svg:x1="8.569cm" svg:y1="15.996cm" svg:x2="9.2cm" svg:y2="15.982cm">
          <text:p/>
        </draw:line>
        <draw:line draw:style-name="gr19" draw:text-style-name="P1" draw:layer="layout" svg:x1="9.6cm" svg:y1="15.982cm" svg:x2="10.2cm" svg:y2="15.982cm">
          <text:p/>
        </draw:line>
        <draw:frame draw:style-name="gr20" draw:text-style-name="P8" draw:layer="layout" svg:width="3.433cm" svg:height="0.801cm" svg:x="8.567cm" svg:y="14.615cm">
          <draw:text-box>
            <text:p text:style-name="P7"><text:span text:style-name="T4">100 nF</text:span></text:p>
          </draw:text-box>
        </draw:frame>
        <draw:path draw:style-name="gr21" draw:text-style-name="P1" draw:layer="layout" svg:width="4.999cm" svg:height="1.405cm" svg:x="8.4cm" svg:y="13.271cm" svg:viewBox="0 0 5000 1406" svg:d="M0 1391c1000-600 992 753 2600-647s800-438 2400-200">
          <text:p/>
        </draw:path>
        <draw:frame draw:style-name="gr22" draw:text-style-name="P8" draw:layer="layout" svg:width="2.512cm" svg:height="0.964cm" svg:x="11.288cm" svg:y="13.415cm">
          <draw:text-box>
            <text:p text:style-name="P7"><text:span text:style-name="T4">GND</text:span></text:p>
          </draw:text-box>
        </draw:frame>
        <draw:frame draw:style-name="gr17" draw:layer="layout" svg:width="0.132cm" svg:height="1.204cm" svg:x="12.268cm" svg:y="16.215cm">
          <draw:text-box>
            <text:p/>
          </draw:text-box>
        </draw:frame>
        <draw:path draw:style-name="gr4" draw:text-style-name="P1" draw:layer="layout" svg:width="0.159cm" svg:height="0.999cm" svg:x="12.84cm" svg:y="15.815cm" svg:viewBox="0 0 160 1000" svg:d="M0 0c0 400 289 200 89 600s71 400 71 400">
          <text:p/>
        </draw:path>
        <draw:frame draw:style-name="gr23" draw:layer="layout" svg:width="0.132cm" svg:height="1.204cm" svg:x="12.068cm" svg:y="16.211cm">
          <draw:text-box>
            <text:p/>
          </draw:text-box>
        </draw:frame>
        <draw:path draw:style-name="gr4" draw:text-style-name="P1" draw:layer="layout" svg:width="0.454cm" svg:height="0.531cm" svg:x="10cm" svg:y="15.961cm" svg:viewBox="0 0 455 532" svg:d="M0 21c200 33 600-167 400 233s-200 250-200 250">
          <text:p/>
        </draw:path>
        <draw:line draw:style-name="gr19" draw:text-style-name="P1" draw:layer="layout" svg:x1="11.437cm" svg:y1="16.815cm" svg:x2="12.068cm" svg:y2="16.801cm">
          <text:p/>
        </draw:line>
        <draw:line draw:style-name="gr19" draw:text-style-name="P1" draw:layer="layout" svg:x1="12.4cm" svg:y1="16.815cm" svg:x2="13cm" svg:y2="16.815cm">
          <text:p/>
        </draw:line>
        <draw:frame draw:style-name="gr24" draw:text-style-name="P8" draw:layer="layout" svg:width="2.033cm" svg:height="0.801cm" svg:x="11.567cm" svg:y="17.214cm">
          <draw:text-box>
            <text:p text:style-name="P7"><text:span text:style-name="T4">10 nF</text:span></text:p>
          </draw:text-box>
        </draw:frame>
        <draw:frame draw:style-name="gr25" draw:text-style-name="P6" draw:layer="layout" svg:width="10.106cm" svg:height="7.371cm" svg:x="17.2cm" svg:y="12.317cm">
          <draw:text-box>
            <text:p text:style-name="P6">I designed a PCB with sensor input frontend for: <text:s/></text:p>
            <text:p text:style-name="P6"/>
            <text:list text:style-name="L1">
              <text:list-item>
                <text:p text:style-name="P6">Thermocouple (Exhaust Temp)</text:p>
              </text:list-item>
              <text:list-item>
                <text:p text:style-name="P6">2 pcs NTC <text:s/>(Water or Oil Temp)</text:p>
              </text:list-item>
              <text:list-item>
                <text:p text:style-name="P6">RPM (Capacitive HV pickup)</text:p>
                <text:p text:style-name="P6"/>
              </text:list-item>
            </text:list>
            <text:p text:style-name="P6">That PCB makes the wiring much easier and more robust with respect to EMI. <text:s text:c="2"/></text:p>
          </draw:text-box>
        </draw:frame>
        <presentation:notes draw:style-name="dp2">
          <office:forms form:automatic-focus="false" form:apply-design-mode="false"/>
          <draw:page-thumbnail draw:style-name="gr1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draw:style-name="gr1" draw:text-style-name="P1" draw:layer="layout" svg:width="10.982cm" svg:height="4.421cm" draw:transform="rotate (-1.57079632679579) translate (22cm 7.859cm)">
          <draw:image xlink:href="Pictures/100000000000019000000098154EA1A8.png" xlink:type="simple" xlink:show="embed" xlink:actuate="onLoad">
            <text:p/>
          </draw:image>
        </draw:frame>
        <draw:frame draw:style-name="gr26" draw:text-style-name="P5" draw:layer="layout" svg:width="6.374cm" svg:height="10.478cm" svg:x="11.4cm" svg:y="7.829cm">
          <draw:text-box>
            <text:p text:style-name="P4"><text:span text:style-name="T2">Bat Neg = G</text:span></text:p>
            <text:p text:style-name="P4"><text:span text:style-name="T2">Bat Pos = 5V</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s/></text:span><text:span text:style-name="T2">RPM_timer = A0</text:span></text:p>
            <text:p text:style-name="P4"><text:span text:style-name="T2">MAP = A1</text:span></text:p>
            <text:p text:style-name="P4"><text:span text:style-name="T2">NTC = A2</text:span></text:p>
            <text:p text:style-name="P4"><text:span text:style-name="T2">MAP VCC &amp; 10k</text:span><text:span text:style-name="T3">Ω to NTC</text:span><text:span text:style-name="T2"> = A3</text:span></text:p>
            <text:p text:style-name="P4"><text:span text:style-name="T2"><text:s/></text:span><text:span text:style-name="T2">TC VCC = A4</text:span></text:p>
            <text:p text:style-name="P4"><text:span text:style-name="T2">A5</text:span></text:p>
            <text:p text:style-name="P4"><text:span text:style-name="T2">LS_PWM = A6</text:span></text:p>
            <text:p text:style-name="P4"><text:span text:style-name="T2">LS_UBat_sense = A7</text:span></text:p>
            <text:p text:style-name="P4"><text:span text:style-name="T2">CJ125_UA <text:s/>= A8</text:span></text:p>
            <text:p text:style-name="P4"><text:span text:style-name="T2">CJ125_UR = A9</text:span></text:p>
            <text:p text:style-name="P4"><text:span text:style-name="T2">CJ125_RST = B2</text:span></text:p>
            <text:p text:style-name="P4"><text:span text:style-name="T2">TC GND = G</text:span></text:p>
          </draw:text-box>
        </draw:frame>
        <draw:frame draw:style-name="gr14" draw:text-style-name="P2" draw:layer="layout" svg:width="5.601cm" svg:height="8.182cm" svg:x="21.999cm" svg:y="7.859cm">
          <draw:text-box>
            <text:p><text:span text:style-name="T1">G = Chassis/box ? <text:s/></text:span></text:p>
            <text:p><text:span text:style-name="T1">G</text:span></text:p>
            <text:p><text:span text:style-name="T1">3V3</text:span></text:p>
            <text:p><text:span text:style-name="T1">3V3</text:span></text:p>
            <text:p><text:span text:style-name="T1">B7 = USART1_RX</text:span></text:p>
            <text:p><text:span text:style-name="T1">B6 = USART2_TX</text:span></text:p>
            <text:p><text:span text:style-name="T1">B5 = SPI1_MOSI <text:s/></text:span></text:p>
            <text:p><text:span text:style-name="T1">B4 = SPI1_MISO </text:span></text:p>
            <text:p><text:span text:style-name="T1">B3 = SPI1_SCK</text:span></text:p>
            <text:p><text:span text:style-name="T1">A15 = CJ125_NSS</text:span></text:p>
            <text:p><text:span text:style-name="T1">A10 = TC_NSS</text:span></text:p>
            <text:p><text:span text:style-name="T1">E4 = LED (on board)</text:span></text:p>
            <text:p><text:span text:style-name="T1">B1 = LS_LED2</text:span></text:p>
            <text:p><text:span text:style-name="T1">B0 = LS_LED1</text:span></text:p>
            <text:p><text:span text:style-name="T1">G = Pres GND</text:span></text:p>
          </draw:text-box>
        </draw:frame>
        <draw:frame draw:style-name="gr1" draw:text-style-name="P1" draw:layer="layout" svg:width="10.8cm" svg:height="11cm" svg:x="0.4cm" svg:y="8cm">
          <draw:image xlink:href="Pictures/10000000000001CD000001D10E5A3A62.png" xlink:type="simple" xlink:show="embed" xlink:actuate="onLoad">
            <text:p/>
          </draw:image>
        </draw:frame>
        <draw:frame presentation:style-name="pr3" draw:layer="layout" svg:width="25.199cm" svg:height="5.209cm" svg:x="1.2cm" svg:y="0.591cm" presentation:class="title" presentation:user-transformed="true">
          <draw:text-box>
            <text:p>Full Featured RaceTemp with <text:s/>Lambda, EGT, MPU, GPS, RPM, NTC, WaterTemp and more</text:p>
          </draw:text-box>
        </draw:frame>
        <draw:frame draw:style-name="gr27" draw:layer="layout" svg:width="20.2cm" svg:height="1.2cm" svg:x="0.8cm" svg:y="6.2cm">
          <draw:text-box>
            <text:p>...but without CAN</text:p>
          </draw:text-box>
        </draw:frame>
        <presentation:notes draw:style-name="dp2">
          <draw:page-thumbnail draw:style-name="gr1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iggo L. Norum</meta:initial-creator>
    <meta:creation-date>2025-08-18T22:19:02.49</meta:creation-date>
    <meta:editing-duration>P14DT3H24M32S</meta:editing-duration>
    <meta:editing-cycles>29</meta:editing-cycles>
    <dc:date>2026-05-01T22:42:33.70</dc:date>
    <dc:creator>Viggo L. Norum</dc:creator>
    <meta:generator>OpenOffice/4.1.15$Win32 OpenOffice.org_project/4115m2$Build-9813</meta:generator>
    <meta:document-statistic meta:object-count="76"/>
  </office:meta>
</office:document-meta>
</file>